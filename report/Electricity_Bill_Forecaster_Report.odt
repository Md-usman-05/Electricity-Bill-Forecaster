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B0000002138FF08B9D.png" manifest:media-type="image/png"/>
  <manifest:file-entry manifest:full-path="Pictures/10000001000002E2000002E7D04043DA.png" manifest:media-type="image/png"/>
  <manifest:file-entry manifest:full-path="Pictures/10000001000001E6000000F89027B8FC.png" manifest:media-type="image/png"/>
  <manifest:file-entry manifest:full-path="Pictures/100000000000045000000378C25B3F4D.png" manifest:media-type="image/png"/>
  <manifest:file-entry manifest:full-path="Pictures/10000000000002AF000001D53DD2418F.png" manifest:media-type="image/png"/>
  <manifest:file-entry manifest:full-path="Pictures/100000010000022C0000037015ED657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left" style:justify-single-word="false"/>
      <style:text-properties style:font-name="Times New Roman" fo:font-size="16pt" fo:font-weight="bold" style:font-size-asian="16pt" style:font-weight-asian="bold" style:font-size-complex="16pt" style:font-weight-complex="bold"/>
    </style:style>
    <style:style style:name="P3"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Text_20_body">
      <style:paragraph-properties fo:text-align="justify" style:justify-single-word="false"/>
      <style:text-properties style:font-name="Times New Roman" fo:font-size="14pt" style:font-size-asian="14pt" style:font-size-complex="14pt"/>
    </style:style>
    <style:style style:name="P6"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7" style:family="paragraph" style:parent-style-name="Text_20_body">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left" style:justify-single-word="false"/>
      <style:text-properties style:font-name="Times New Roman" fo:font-size="16pt" fo:font-weight="bold" style:font-size-asian="14pt" style:font-weight-asian="bold" style:font-size-complex="16pt" style:font-weight-complex="bold"/>
    </style:style>
    <style:style style:name="P10" style:family="paragraph" style:parent-style-name="Text_20_body">
      <style:text-properties style:font-name="Times New Roman" fo:font-size="14pt" style:font-size-asian="14pt" style:font-size-complex="14pt"/>
    </style:style>
    <style:style style:name="P11"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imes New Roman" fo:font-size="16pt" fo:font-weight="bold" officeooo:paragraph-rsid="00066ff2"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weight="bold" officeooo:paragraph-rsid="00066ff2" style:font-weight-asian="bold" style:font-weight-complex="bold"/>
    </style:style>
    <style:style style:name="P15" style:family="paragraph" style:parent-style-name="Standard">
      <style:paragraph-properties fo:text-align="left" style:justify-single-word="false"/>
      <style:text-properties style:font-name="Times New Roman" fo:font-size="13pt" fo:font-weight="bold" style:font-size-asian="13pt" style:font-weight-asian="bold" style:font-size-complex="13pt" style:font-weight-complex="bold"/>
    </style:style>
    <style:style style:name="P16" style:family="paragraph" style:parent-style-name="Standard">
      <style:paragraph-properties fo:text-align="center" style:justify-single-word="false"/>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3pt" style:font-size-asian="13pt" style:font-size-complex="13pt"/>
    </style:style>
    <style:style style:name="T4" style:family="text">
      <style:text-properties style:font-name="Times New Roman" fo:font-size="16pt" style:font-size-asian="16pt" style:font-size-complex="16pt"/>
    </style:style>
    <style:style style:name="T5" style:family="text">
      <style:text-properties style:font-name="Times New Roman" fo:font-size="13pt" style:font-size-asian="13pt" style:font-size-complex="13pt"/>
    </style:style>
    <style:style style:name="T6" style:family="text">
      <style:text-properties style:font-name="Times New Roman" fo:font-size="16pt" fo:font-weight="bold" style:font-size-asian="16pt" style:font-weight-asian="bold" style:font-size-complex="16pt" style:font-weight-complex="bold"/>
    </style:style>
    <style:style style:name="T7" style:family="text">
      <style:text-properties fo:font-size="13pt" fo:font-weight="bold" style:font-size-asian="13pt" style:font-weight-asian="bold" style:font-size-complex="13pt" style:font-weight-complex="bold"/>
    </style:style>
    <style:style style:name="T8" style:family="text">
      <style:text-properties style:font-name="Times New Roman"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ectricity Bill Forecaster Using Multiple Linear Regression</text:p>
      <text:p text:style-name="P1"/>
      <text:p text:style-name="P2">Introduction</text:p>
      <text:p text:style-name="P2"/>
      <text:p text:style-name="P3">Electricity plays a vital role in our daily lives, and managing electricity consumption has become increasingly important for reducing household expenses. Many users are unaware of their expected electricity bill until it is generated, making it difficult to plan monthly expenses or monitor excessive power usage.</text:p>
      <text:p text:style-name="P4"><text:span text:style-name="T1">The </text:span><text:span text:style-name="Strong_20_Emphasis"><text:span text:style-name="T1">Electricity Bill Forecaster</text:span></text:span><text:span text:style-name="T1"> is a machine learning application that predicts monthly electricity consumption and estimates the corresponding electricity bill using the </text:span><text:span text:style-name="Strong_20_Emphasis"><text:span text:style-name="T1">Multiple Linear Regression</text:span></text:span><text:span text:style-name="T1"> algorithm. The prediction is based on household characteristics such as family size, number of electrical appliances, previous month's electricity usage, average daily usage hours, and temperature.</text:span></text:p>
      <text:p text:style-name="P5">This project demonstrates the practical application of machine learning in solving a real-world forecasting problem while helping users better understand their electricity consumption patterns.</text:p>
      <text:p text:style-name="P6"/>
      <text:p text:style-name="P2">Problem Statement</text:p>
      <text:p text:style-name="P2"/>
      <text:p text:style-name="P3">The objective of this project is to develop a machine learning model capable of predicting monthly electricity consumption and estimating the electricity bill based on household usage patterns.</text:p>
      <text:p text:style-name="P7"><text:span text:style-name="T2">The application accepts several household-related inputs including family members, number of air conditioners, fans, refrigerators, televisions, washing machine usage, daily electricity usage hours, previous month's electricity units, and average temperature. Using these features, a </text:span><text:span text:style-name="Strong_20_Emphasis"><text:span text:style-name="T2">Multiple Linear Regression</text:span></text:span><text:span text:style-name="T2"> model predicts monthly electricity units, after which the estimated electricity bill is calculated using a predefined tariff formula.</text:span></text:p>
      <text:p text:style-name="P3">The system helps users estimate their future electricity expenses and promotes efficient energy management.</text:p>
      <text:p text:style-name="P8"/>
      <text:p text:style-name="P9">Results and Discussion</text:p>
      <text:p text:style-name="P9"/>
      <text:p text:style-name="P3">The project was successfully implemented using Python, Scikit-learn, Pandas, and Flask. A realistic synthetic dataset was generated and analyzed through Exploratory Data Analysis (EDA) using visualizations such as correlation heatmaps, histograms, scatter plots, and box plots.</text:p>
      <text:p text:style-name="P5"><text:soft-page-break/>The Multiple Linear Regression model was trained using 80% of the dataset and tested using the remaining 20%. The model performance was evaluated using Mean Absolute Error (MAE), Root Mean Squared Error (RMSE), and R² Score.</text:p>
      <text:p text:style-name="P5">A Flask-based web application was developed where users can enter household details and instantly receive predicted electricity units along with the estimated monthly electricity bill. The prediction results were consistent with the generated dataset and demonstrated the effectiveness of the regression model.</text:p>
      <text:p text:style-name="P10"><draw:frame draw:style-name="fr1" draw:name="Image1" text:anchor-type="char" svg:x="4.526cm" svg:y="0.005cm" svg:width="9.14cm" svg:height="9.432cm" draw:z-index="0"><draw:image xlink:href="Pictures/10000001000001B0000002138FF08B9D.png" xlink:type="simple" xlink:show="embed" xlink:actuate="onLoad" draw:mime-type="image/png"/></draw:frame></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draw:frame draw:style-name="fr1" draw:name="Image2" text:anchor-type="char" svg:x="0.314cm" svg:y="1.023cm" svg:width="17cm" svg:height="8.67cm" draw:z-index="1"><draw:image xlink:href="Pictures/100000000000045000000378C25B3F4D.png" xlink:type="simple" xlink:show="embed" xlink:actuate="onLoad" draw:mime-type="image/png"/></draw:frame>Figure 1 : Project Folder Structure</text:p>
      <text:p text:style-name="P12"/>
      <text:p text:style-name="P11">Figure 2 <text:s/>: Correlation Heatmap </text:p>
      <text:p text:style-name="P1"><draw:frame draw:style-name="fr1" draw:name="Image3" text:anchor-type="char" svg:x="1.106cm" svg:y="-0.727cm" svg:width="15.75cm" svg:height="9.927cm" draw:z-index="2"><draw:image xlink:href="Pictures/10000000000002AF000001D53DD2418F.png" xlink:type="simple" xlink:show="embed" xlink:actuate="onLoad" draw:mime-type="image/png"/></draw:frame><text:soft-page-break/></text:p>
      <text:p text:style-name="P1"><text:s/><text:span text:style-name="T3">Figure 3 : Histogram (Monthly Units Distribution) </text:span></text:p>
      <text:p text:style-name="P1"/>
      <text:p text:style-name="P13"/>
      <text:p text:style-name="P13"><draw:frame draw:style-name="fr1" draw:name="Image4" text:anchor-type="char" svg:x="1.699cm" svg:y="0.123cm" svg:width="15.609cm" svg:height="9.416cm" draw:z-index="3"><draw:image xlink:href="Pictures/10000001000001E6000000F89027B8FC.png" xlink:type="simple" xlink:show="embed" xlink:actuate="onLoad" draw:mime-type="image/png"/></draw:frame></text:p>
      <text:p text:style-name="P13"/>
      <text:p text:style-name="P14"><text:span text:style-name="T4"><text:s text:c="10"/></text:span><text:span text:style-name="T5"><text:s text:c="2"/></text:span><text:span text:style-name="T3">Figure 4: Model Evaluation Metrics of the Multiple Linear Regression Model </text:span></text:p>
      <text:p text:style-name="P15"/>
      <text:p text:style-name="P2"/>
      <text:p text:style-name="P2"><text:soft-page-break/></text:p>
      <text:p text:style-name="P16"><text:span text:style-name="T6"><text:s text:c="7"/></text:span><text:span text:style-name="T7">Figure 5: Electricity Bill Forecaster Home Page </text:span></text:p>
      <text:p text:style-name="P2"><draw:frame draw:style-name="fr1" draw:name="Image5" text:anchor-type="char" svg:x="1.367cm" svg:y="0.309cm" svg:width="15.623cm" svg:height="7.537cm" draw:z-index="4"><draw:image xlink:href="Pictures/10000001000002E2000002E7D04043DA.png" xlink:type="simple" xlink:show="embed" xlink:actuate="onLoad" draw:mime-type="image/png"/></draw:frame><draw:frame draw:style-name="fr1" draw:name="Image6" text:anchor-type="char" svg:x="4.168cm" svg:y="8.437cm" svg:width="11.77cm" svg:height="12.642cm" draw:z-index="5"><draw:image xlink:href="Pictures/100000010000022C0000037015ED65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pan text:style-name="T6"><text:s text:c="22"/></text:span><text:span text:style-name="T8"><text:s/></text:span><text:span text:style-name="T7">Figure 6: Electricity Bill Prediction Resul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top="1.5pt solid #000000" fo:border-bottom="1.5pt solid #000000" fo:border-left="1.5pt solid #000000" fo:border-right="none" fo:padding="0.04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9T19:13:29.535374800</meta:creation-date>
    <meta:generator>LibreOffice/26.2.0.3$Windows_X86_64 LibreOffice_project/620$Build-3</meta:generator>
    <dc:date>2026-07-19T19:40:43.493030300</dc:date>
    <meta:editing-duration>PT2M56S</meta:editing-duration>
    <meta:editing-cycles>1</meta:editing-cycles>
    <meta:document-statistic meta:table-count="0" meta:image-count="6" meta:object-count="0" meta:page-count="4" meta:paragraph-count="19" meta:word-count="388" meta:character-count="2896" meta:non-whitespace-character-count="2479"/>
  </office:meta>
</office:document-meta>
</file>